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900000414D54244D8.png" manifest:media-type="image/png"/>
  <manifest:file-entry manifest:full-path="Pictures/1000000100000319000004149E080CB4.png" manifest:media-type="image/png"/>
  <manifest:file-entry manifest:full-path="Pictures/1000000100000319000004141E8EF93F.png" manifest:media-type="image/png"/>
  <manifest:file-entry manifest:full-path="Pictures/100000010000031900000414A743BD33.png" manifest:media-type="image/png"/>
  <manifest:file-entry manifest:full-path="Pictures/100000010000031900000414F286CD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9dd"/>
    </style:style>
    <style:style style:name="P2" style:family="paragraph" style:parent-style-name="Standard">
      <style:paragraph-properties fo:break-before="page"/>
      <style:text-properties officeooo:paragraph-rsid="000e0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98in" svg:y="-0.7874in" svg:width="8.2437in" svg:height="10.852in" draw:z-index="0"><draw:image xlink:href="Pictures/100000010000031900000414F286CD63.png" xlink:type="simple" xlink:show="embed" xlink:actuate="onLoad" draw:mime-type="image/png"/></draw:frame></text:p>
      <text:p text:style-name="P1"><draw:frame draw:style-name="fr1" draw:name="Image2" text:anchor-type="char" svg:x="-0.7764in" svg:y="-0.7752in" svg:width="8.2571in" svg:height="10.8693in" draw:z-index="1"><draw:image xlink:href="Pictures/100000010000031900000414A743BD33.png" xlink:type="simple" xlink:show="embed" xlink:actuate="onLoad" draw:mime-type="image/png"/></draw:frame><text:soft-page-break/></text:p>
      <text:p text:style-name="P2"><draw:frame draw:style-name="fr1" draw:name="Image3" text:anchor-type="char" svg:x="-0.7772in" svg:y="-0.7772in" svg:width="8.2575in" svg:height="10.8709in" draw:z-index="2"><draw:image xlink:href="Pictures/1000000100000319000004141E8EF93F.png" xlink:type="simple" xlink:show="embed" xlink:actuate="onLoad" draw:mime-type="image/png"/></draw:frame></text:p>
      <text:p text:style-name="P2"><draw:frame draw:style-name="fr1" draw:name="Image4" text:anchor-type="char" svg:x="-0.7854in" svg:y="-0.7673in" svg:width="8.2661in" svg:height="10.8819in" draw:z-index="3"><draw:image xlink:href="Pictures/1000000100000319000004149E080CB4.png" xlink:type="simple" xlink:show="embed" xlink:actuate="onLoad" draw:mime-type="image/png"/></draw:frame></text:p>
      <text:p text:style-name="P2"><draw:frame draw:style-name="fr1" draw:name="Image5" text:anchor-type="char" svg:x="-0.7575in" svg:y="-0.7772in" svg:width="8.2382in" svg:height="10.8453in" draw:z-index="4"><draw:image xlink:href="Pictures/100000010000031900000414D54244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21:51:58.908331579</meta:creation-date>
    <dc:date>2026-05-27T21:56:24.734194256</dc:date>
    <meta:editing-duration>PT4M27S</meta:editing-duration>
    <meta:editing-cycles>1</meta:editing-cycles>
    <meta:generator>LibreOffice/24.2.7.2$Linux_X86_64 LibreOffice_project/42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